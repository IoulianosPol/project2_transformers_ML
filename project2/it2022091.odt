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16" manifest:media-type=""/>
  <manifest:file-entry manifest:full-path="ObjectReplacements/Object 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C9000003AA2FCE49B1.png" manifest:media-type="image/png"/>
  <manifest:file-entry manifest:full-path="Pictures/1003971D0000256F000018FE539E0373.svg" manifest:media-type="image/svg+xml"/>
  <manifest:file-entry manifest:full-path="Pictures/10000001000001C50000012E01DF0F94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Πίνακας1" style:family="table">
      <style:table-properties style:width="17.498cm" fo:margin-left="0cm" table:align="left" style:shadow="none" style:may-break-between-rows="true" table:border-model="collapsing"/>
    </style:style>
    <style:style style:name="Πίνακας1.A" style:family="table-column">
      <style:table-column-properties style:column-width="4.713cm"/>
    </style:style>
    <style:style style:name="Πίνακας1.B" style:family="table-column">
      <style:table-column-properties style:column-width="3.787cm"/>
    </style:style>
    <style:style style:name="Πίνακας1.C" style:family="table-column">
      <style:table-column-properties style:column-width="4.249cm"/>
    </style:style>
    <style:style style:name="Πίνακας1.D" style:family="table-column">
      <style:table-column-properties style:column-width="4.748cm"/>
    </style:style>
    <style:style style:name="Πίνακας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Πίνακας1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Πίνακας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Πίνακας1.B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Πίνακας1.C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Πίνακας1.D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Πίνακας1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Πίνακας1.B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Πίνακας1.C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Πίνακας1.D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Πίνακας1.B4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Πίνακας1.C4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Πίνακας1.D4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Πίνακας1.B5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Πίνακας1.C5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Πίνακας1.D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Πίνακας1.B6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Πίνακας1.C6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Πίνακας1.D6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Πίνακας1.B7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Πίνακας1.C7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Πίνακας1.D7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Πίνακας1.B8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Πίνακας1.C8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Πίνακας1.D8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Πίνακας1.B9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Πίνακας1.C9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Πίνακας1.D9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Πίνακας1.B10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Πίνακας1.C10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Πίνακας1.D10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Πίνακας1.B11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Πίνακας1.C11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Πίνακας1.D11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Πίνακας1.B1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Πίνακας1.C1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Πίνακας1.D1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Πίνακας1.B1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Πίνακας1.C1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Πίνακας1.D1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Πίνακας1.B14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Πίνακας1.C14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Πίνακας1.D14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Πίνακας1.B15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Πίνακας1.C15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Πίνακας1.D1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Πίνακας1.B16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Πίνακας1.C16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Πίνακας1.D16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Πίνακας1.B17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Πίνακας1.C17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Πίνακας1.D17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Πίνακας1.B18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Πίνακας1.C18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Πίνακας1.D18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Πίνακας1.B19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Πίνακας1.C19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Πίνακας1.D19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Πίνακας1.B20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Πίνακας1.C20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Πίνακας1.D20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Πίνακας1.B21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Πίνακας1.C21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Πίνακας1.D21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Πίνακας1.B2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Πίνακας1.C2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Πίνακας1.D2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Πίνακας1.B2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Πίνακας1.C2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Πίνακας1.D2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Πίνακας1.B24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Πίνακας1.C24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Πίνακας1.D24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Πίνακας1.B25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Πίνακας1.C25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Πίνακας1.D2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Πίνακας1.B26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Πίνακας1.C26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Πίνακας1.D26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Πίνακας1.B27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Πίνακας1.C27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Πίνακας1.D27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Πίνακας1.28" style:family="table-row">
      <style:table-row-properties fo:keep-together="auto"/>
    </style:style>
    <style:style style:name="Πίνακας1.B28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Πίνακας1.C28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Πίνακας1.D28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Πίνακας1.A29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Πίνακας1.B29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Πίνακας1.C29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Πίνακας1.D29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5pt" fo:language="el" fo:country="GR" fo:font-weight="bold" officeooo:rsid="001464f6" officeooo:paragraph-rsid="001e499a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fo:language="el" fo:country="GR" fo:font-weight="normal" officeooo:rsid="001464f6" officeooo:paragraph-rsid="001e499a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5pt" fo:language="el" fo:country="GR" fo:font-weight="bold" officeooo:rsid="001464f6" officeooo:paragraph-rsid="001e499a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5pt" fo:language="el" fo:country="GR" fo:font-weight="normal" officeooo:rsid="001464f6" officeooo:paragraph-rsid="001e499a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language="el" fo:country="GR" fo:font-weight="bold" officeooo:rsid="003579b0" officeooo:paragraph-rsid="003579b0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language="el" fo:country="GR" fo:font-weight="normal" officeooo:rsid="001e499a" officeooo:paragraph-rsid="001e499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position="0% 100%" fo:font-size="12pt" fo:language="el" fo:country="GR" fo:font-weight="normal" officeooo:rsid="001e499a" officeooo:paragraph-rsid="001e499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position="0% 100%" fo:font-size="12pt" fo:language="el" fo:country="GR" fo:font-weight="normal" officeooo:rsid="001fd74b" officeooo:paragraph-rsid="001fd74b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text-position="0% 100%" fo:font-size="12pt" fo:language="el" fo:country="GR" fo:font-weight="normal" officeooo:rsid="001fd74b" officeooo:paragraph-rsid="001fd74b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officeooo:paragraph-rsid="0021945a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23a072"/>
    </style:style>
    <style:style style:name="P12" style:family="paragraph" style:parent-style-name="Standard">
      <style:paragraph-properties fo:text-align="start" style:justify-single-word="false"/>
      <style:text-properties officeooo:paragraph-rsid="0023a072"/>
    </style:style>
    <style:style style:name="P13" style:family="paragraph" style:parent-style-name="Standard">
      <style:paragraph-properties fo:text-align="start" style:justify-single-word="false"/>
      <style:text-properties style:text-position="0% 100%" fo:font-size="12pt" fo:language="en" fo:country="GB" fo:font-weight="normal" officeooo:rsid="0021945a" officeooo:paragraph-rsid="002a69fc" style:font-size-asian="10.5pt" style:font-weight-asian="normal" style:font-size-complex="12pt" style:font-weight-complex="normal"/>
    </style:style>
    <style:style style:name="P1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 style:parent-style-name="Standard">
      <style:paragraph-properties fo:text-align="start" style:justify-single-word="false"/>
      <style:text-properties style:text-position="0% 100%" officeooo:paragraph-rsid="00245bbd"/>
    </style:style>
    <style:style style:name="P16" style:family="paragraph" style:parent-style-name="Standard">
      <style:paragraph-properties fo:text-align="start" style:justify-single-word="false"/>
      <style:text-properties style:text-position="0% 100%" officeooo:paragraph-rsid="00254e34"/>
    </style:style>
    <style:style style:name="P17" style:family="paragraph" style:parent-style-name="Standard">
      <style:paragraph-properties fo:text-align="start" style:justify-single-word="false"/>
      <style:text-properties fo:font-size="14pt" fo:language="el" fo:country="GR" fo:font-weight="bold" officeooo:rsid="003579b0" officeooo:paragraph-rsid="003579b0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officeooo:paragraph-rsid="00245bbd"/>
    </style:style>
    <style:style style:name="P19" style:family="paragraph" style:parent-style-name="Standard">
      <style:paragraph-properties fo:text-align="start" style:justify-single-word="false"/>
      <style:text-properties fo:language="el" fo:country="GR" officeooo:rsid="002d7727" officeooo:paragraph-rsid="002d7727"/>
    </style:style>
    <style:style style:name="P20" style:family="paragraph" style:parent-style-name="Standard">
      <style:paragraph-properties fo:text-align="start" style:justify-single-word="false"/>
      <style:text-properties fo:language="el" fo:country="GR" officeooo:rsid="002d7fb4" officeooo:paragraph-rsid="002d7fb4"/>
    </style:style>
    <style:style style:name="P21" style:family="paragraph" style:parent-style-name="Standard">
      <style:paragraph-properties fo:text-align="start" style:justify-single-word="false"/>
      <style:text-properties fo:language="el" fo:country="GR" officeooo:rsid="00245bbd" officeooo:paragraph-rsid="00245bbd"/>
    </style:style>
    <style:style style:name="P22" style:family="paragraph" style:parent-style-name="Standard">
      <style:paragraph-properties fo:text-align="start" style:justify-single-word="false"/>
      <style:text-properties style:text-position="0% 100%" fo:font-size="12pt" fo:language="en" fo:country="GB" fo:font-weight="normal" officeooo:rsid="00245bbd" officeooo:paragraph-rsid="00245bbd" style:font-size-asian="10.5pt" style:font-weight-asian="normal" style:font-size-complex="12pt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fo:language="el" fo:country="GR" officeooo:rsid="00269802" officeooo:paragraph-rsid="002a69fc"/>
    </style:style>
    <style:style style:name="P24" style:family="paragraph" style:parent-style-name="Standard" style:list-style-name="L2">
      <style:paragraph-properties fo:text-align="start" style:justify-single-word="false"/>
      <style:text-properties fo:language="el" fo:country="GR" officeooo:rsid="002a69fc" officeooo:paragraph-rsid="002a69fc"/>
    </style:style>
    <style:style style:name="P25" style:family="paragraph" style:parent-style-name="Standard">
      <style:paragraph-properties fo:text-align="start" style:justify-single-word="false"/>
      <style:text-properties fo:language="el" fo:country="GR" officeooo:rsid="002bd788" officeooo:paragraph-rsid="002bd788"/>
    </style:style>
    <style:style style:name="P26" style:family="paragraph" style:parent-style-name="Standard">
      <style:paragraph-properties fo:text-align="start" style:justify-single-word="false"/>
      <style:text-properties style:text-position="0% 100%" fo:font-size="12pt" fo:language="el" fo:country="GR" fo:font-weight="normal" officeooo:rsid="002bd788" officeooo:paragraph-rsid="002bd788" style:font-size-asian="10.5pt" style:font-weight-asian="normal" style:font-size-complex="12pt" style:font-weight-complex="normal"/>
    </style:style>
    <style:style style:name="P27" style:family="paragraph" style:parent-style-name="Standard" style:list-style-name="L3">
      <style:paragraph-properties fo:text-align="start" style:justify-single-word="false"/>
      <style:text-properties fo:language="el" fo:country="GR" officeooo:rsid="00269802" officeooo:paragraph-rsid="002f6d41"/>
    </style:style>
    <style:style style:name="P28" style:family="paragraph" style:parent-style-name="Standard" style:list-style-name="L3">
      <style:paragraph-properties fo:text-align="start" style:justify-single-word="false"/>
      <style:text-properties fo:language="el" fo:country="GR" officeooo:rsid="002e39d5" officeooo:paragraph-rsid="002f6d41"/>
    </style:style>
    <style:style style:name="P29" style:family="paragraph" style:parent-style-name="Standard" style:list-style-name="L3">
      <style:paragraph-properties fo:text-align="start" style:justify-single-word="false"/>
      <style:text-properties fo:language="el" fo:country="GR" officeooo:rsid="002a69fc" officeooo:paragraph-rsid="002f6d41"/>
    </style:style>
    <style:style style:name="P30" style:family="paragraph" style:parent-style-name="Standard">
      <style:paragraph-properties fo:text-align="start" style:justify-single-word="false"/>
      <style:text-properties fo:language="el" fo:country="GR" officeooo:rsid="002a69fc" officeooo:paragraph-rsid="002f6d41"/>
    </style:style>
    <style:style style:name="P31" style:family="paragraph" style:parent-style-name="Heading_20_3">
      <style:paragraph-properties fo:text-align="start" style:justify-single-word="false"/>
      <style:text-properties style:text-position="0% 100%" fo:font-size="14pt" fo:language="en" fo:country="GB" fo:font-weight="bold" officeooo:rsid="002a69fc" officeooo:paragraph-rsid="002f6d41" style:font-size-asian="14pt" style:font-weight-asian="bold" style:font-size-complex="14pt" style:font-weight-complex="bold"/>
    </style:style>
    <style:style style:name="P32" style:family="paragraph" style:parent-style-name="Text_20_body">
      <style:paragraph-properties fo:text-align="start" style:justify-single-word="false"/>
      <style:text-properties fo:font-size="14pt" fo:language="el" fo:country="GR" fo:font-weight="bold" officeooo:rsid="002a69fc" officeooo:paragraph-rsid="002f6d41" style:font-size-asian="14pt" style:font-weight-asian="bold" style:font-size-complex="14pt" style:font-weight-complex="bold"/>
    </style:style>
    <style:style style:name="P33" style:family="paragraph" style:parent-style-name="Text_20_body">
      <style:paragraph-properties fo:text-align="start" style:justify-single-word="false"/>
      <style:text-properties officeooo:paragraph-rsid="003579b0"/>
    </style:style>
    <style:style style:name="P34" style:family="paragraph" style:parent-style-name="Text_20_body">
      <style:paragraph-properties fo:text-align="start" style:justify-single-word="false"/>
      <style:text-properties fo:language="el" fo:country="GR" officeooo:rsid="0035dd55" officeooo:paragraph-rsid="0035dd55"/>
    </style:style>
    <style:style style:name="P35" style:family="paragraph" style:parent-style-name="Text_20_body">
      <style:paragraph-properties fo:text-align="start" style:justify-single-word="false"/>
      <style:text-properties officeooo:paragraph-rsid="0035dd55"/>
    </style:style>
    <style:style style:name="P36" style:family="paragraph" style:parent-style-name="Text_20_body">
      <style:paragraph-properties fo:text-align="start" style:justify-single-word="false"/>
      <style:text-properties style:font-name="Liberation Serif" fo:font-size="14pt" fo:language="el" fo:country="GR" fo:font-weight="bold" officeooo:rsid="0035dd55" officeooo:paragraph-rsid="0035dd55" style:font-size-asian="14pt" style:font-weight-asian="bold" style:font-size-complex="14pt" style:font-weight-complex="bold"/>
    </style:style>
    <style:style style:name="P37" style:family="paragraph" style:parent-style-name="Standard" style:list-style-name="L3">
      <style:paragraph-properties fo:text-align="start" style:justify-single-word="false"/>
      <style:text-properties officeooo:paragraph-rsid="002f6d41"/>
    </style:style>
    <style:style style:name="P38" style:family="paragraph" style:parent-style-name="Standard">
      <style:paragraph-properties fo:text-align="start" style:justify-single-word="false"/>
      <style:text-properties fo:language="el" fo:country="GR" officeooo:rsid="003579b0" officeooo:paragraph-rsid="003579b0"/>
    </style:style>
    <style:style style:name="P39" style:family="paragraph" style:parent-style-name="Standard">
      <style:paragraph-properties fo:text-align="start" style:justify-single-word="false"/>
      <style:text-properties fo:font-size="15pt" fo:language="el" fo:country="GR" fo:font-weight="bold" officeooo:rsid="002bd788" officeooo:paragraph-rsid="002bd788" style:font-size-asian="13.1000003814697pt" style:font-weight-asian="bold" style:font-size-complex="15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language="el" fo:country="GR" fo:font-weight="bold" officeooo:rsid="00375fae" officeooo:paragraph-rsid="00375fae" style:font-size-asian="12pt" style:font-weight-asian="bold" style:font-size-complex="12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l" fo:country="GR" fo:font-style="normal" fo:text-shadow="none" style:text-underline-style="none" fo:font-weight="normal" officeooo:rsid="00360ec2" officeooo:paragraph-rsid="00360e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language="en" fo:country="GB"/>
    </style:style>
    <style:style style:name="T2" style:family="text">
      <style:text-properties style:text-position="super 58%" fo:language="en" fo:country="GB"/>
    </style:style>
    <style:style style:name="T3" style:family="text">
      <style:text-properties style:text-position="0% 100%" fo:language="en" fo:country="GB"/>
    </style:style>
    <style:style style:name="T4" style:family="text">
      <style:text-properties style:text-position="sub 58%" fo:language="en" fo:country="GB"/>
    </style:style>
    <style:style style:name="T5" style:family="text">
      <style:text-properties style:text-position="0% 100%" fo:font-size="12pt" fo:language="el" fo:country="GR" fo:font-weight="normal" officeooo:rsid="0021945a" style:font-size-asian="10.5pt" style:font-weight-asian="normal" style:font-size-complex="12pt" style:font-weight-complex="normal"/>
    </style:style>
    <style:style style:name="T6" style:family="text">
      <style:text-properties style:text-position="0% 100%" fo:font-size="12pt" fo:language="en" fo:country="GB" fo:font-weight="normal" officeooo:rsid="0021945a" style:font-size-asian="10.5pt" style:font-weight-asian="normal" style:font-size-complex="12pt" style:font-weight-complex="normal"/>
    </style:style>
    <style:style style:name="T7" style:family="text">
      <style:text-properties style:text-position="sub 58%" fo:font-size="12pt" fo:language="en" fo:country="GB" fo:font-weight="normal" officeooo:rsid="0021945a" style:font-size-asian="10.5pt" style:font-weight-asian="normal" style:font-size-complex="12pt" style:font-weight-complex="normal"/>
    </style:style>
    <style:style style:name="T8" style:family="text">
      <style:text-properties fo:language="el" fo:country="GR" officeooo:rsid="0023a072"/>
    </style:style>
    <style:style style:name="T9" style:family="text">
      <style:text-properties fo:language="en" fo:country="GB" officeooo:rsid="0023a072"/>
    </style:style>
    <style:style style:name="T10" style:family="text">
      <style:text-properties fo:font-size="12pt" fo:language="en" fo:country="GB" fo:font-weight="normal" officeooo:rsid="0021945a" style:font-size-asian="10.5pt" style:font-weight-asian="normal" style:font-size-complex="12pt" style:font-weight-complex="normal"/>
    </style:style>
    <style:style style:name="T11" style:family="text">
      <style:text-properties style:text-position="0% 100%" officeooo:rsid="0021945a"/>
    </style:style>
    <style:style style:name="T12" style:family="text">
      <style:text-properties style:text-position="0% 100%"/>
    </style:style>
    <style:style style:name="T13" style:family="text">
      <style:text-properties style:text-position="0% 100%" fo:font-size="12pt" fo:language="el" fo:country="GR" fo:font-weight="normal" officeooo:rsid="00245bbd" style:font-size-asian="10.5pt" style:font-weight-asian="normal" style:font-size-complex="12pt" style:font-weight-complex="normal"/>
    </style:style>
    <style:style style:name="T14" style:family="text">
      <style:text-properties style:text-position="0% 100%" fo:font-size="12pt" fo:font-weight="normal" style:font-size-asian="10.5pt" style:font-weight-asian="normal" style:font-size-complex="12pt" style:font-weight-complex="normal"/>
    </style:style>
    <style:style style:name="T15" style:family="text">
      <style:text-properties style:text-position="0% 100%" fo:font-size="12pt" fo:language="en" fo:country="GB" fo:font-weight="normal" officeooo:rsid="00245bbd" style:font-size-asian="10.5pt" style:font-weight-asian="normal" style:font-size-complex="12pt" style:font-weight-complex="normal"/>
    </style:style>
    <style:style style:name="T16" style:family="text">
      <style:text-properties style:text-position="0% 100%" fo:font-size="12pt" fo:font-weight="normal" officeooo:rsid="00245bbd" style:font-size-asian="10.5pt" style:font-weight-asian="normal" style:font-size-complex="12pt" style:font-weight-complex="normal"/>
    </style:style>
    <style:style style:name="T17" style:family="text">
      <style:text-properties style:text-position="0% 100%" fo:font-size="12pt" fo:language="en" fo:country="GB" fo:font-weight="normal" style:font-size-asian="10.5pt" style:font-weight-asian="normal" style:font-size-complex="12pt" style:font-weight-complex="normal"/>
    </style:style>
    <style:style style:name="T18" style:family="text">
      <style:text-properties style:text-position="0% 100%" fo:font-size="12pt" fo:font-weight="normal" officeooo:rsid="00269802" style:font-size-asian="10.5pt" style:font-weight-asian="normal" style:font-size-complex="12pt" style:font-weight-complex="normal"/>
    </style:style>
    <style:style style:name="T19" style:family="text">
      <style:text-properties style:text-position="0% 100%" fo:font-size="12pt" fo:font-weight="normal" officeooo:rsid="002f6d41" style:font-size-asian="10.5pt" style:font-weight-asian="normal" style:font-size-complex="12pt" style:font-weight-complex="normal"/>
    </style:style>
    <style:style style:name="T20" style:family="text">
      <style:text-properties style:text-position="0% 100%" fo:font-size="12pt" fo:font-weight="normal" officeooo:rsid="002e39d5" style:font-size-asian="10.5pt" style:font-weight-asian="normal" style:font-size-complex="12pt" style:font-weight-complex="normal"/>
    </style:style>
    <style:style style:name="T21" style:family="text">
      <style:text-properties style:text-position="0% 100%" fo:font-size="12pt" fo:font-weight="normal" officeooo:rsid="0030b700" style:font-size-asian="10.5pt" style:font-weight-asian="normal" style:font-size-complex="12pt" style:font-weight-complex="normal"/>
    </style:style>
    <style:style style:name="T22" style:family="text">
      <style:text-properties style:text-position="0% 100%" fo:font-size="12pt" fo:font-weight="normal" officeooo:rsid="0028dfb2" style:font-size-asian="10.5pt" style:font-weight-asian="normal" style:font-size-complex="12pt" style:font-weight-complex="normal"/>
    </style:style>
    <style:style style:name="T23" style:family="text">
      <style:text-properties style:text-position="0% 100%" fo:font-size="12pt" fo:font-weight="normal" officeooo:rsid="0021945a" style:font-size-asian="10.5pt" style:font-weight-asian="normal" style:font-size-complex="12pt" style:font-weight-complex="normal"/>
    </style:style>
    <style:style style:name="T24" style:family="text">
      <style:text-properties style:text-position="0% 100%" fo:font-size="12pt" fo:language="en" fo:country="GB" fo:font-weight="normal" officeooo:rsid="002f6d41" style:font-size-asian="10.5pt" style:font-weight-asian="normal" style:font-size-complex="12pt" style:font-weight-complex="normal"/>
    </style:style>
    <style:style style:name="T25" style:family="text">
      <style:text-properties fo:font-size="12pt" fo:language="el" fo:country="GR" fo:font-weight="normal" officeooo:rsid="002a69fc" style:font-size-asian="10.5pt" style:font-weight-asian="normal" style:font-size-complex="12pt" style:font-weight-complex="normal"/>
    </style:style>
    <style:style style:name="T26" style:family="text">
      <style:text-properties fo:font-size="12pt" fo:language="el" fo:country="GR" officeooo:rsid="002a69fc" style:font-size-asian="10.5pt" style:font-size-complex="12pt"/>
    </style:style>
    <style:style style:name="T27" style:family="text">
      <style:text-properties fo:font-size="12pt" fo:language="el" fo:country="GR" fo:font-weight="normal" officeooo:rsid="003579b0" style:font-size-asian="10.5pt" style:font-weight-asian="normal" style:font-size-complex="12pt" style:font-weight-complex="normal"/>
    </style:style>
    <style:style style:name="T28" style:family="text">
      <style:text-properties style:font-name="Liberation Serif"/>
    </style:style>
    <style:style style:name="T29" style:family="text">
      <style:text-properties style:font-name="Liberation Serif" fo:language="el" fo:country="GR" officeooo:rsid="0035dd55"/>
    </style:style>
    <style:style style:name="T30" style:family="text">
      <style:text-properties style:font-name="Liberation Serif" fo:language="en" fo:country="GB"/>
    </style:style>
    <style:style style:name="T31" style:family="text">
      <style:text-properties style:font-name="Liberation Serif" fo:language="en" fo:country="GB" officeooo:rsid="0035dd55"/>
    </style:style>
    <style:style style:name="T32" style:family="text">
      <style:text-properties style:text-position="super 58%" style:font-name="Liberation Serif" fo:language="en" fo:country="GB" officeooo:rsid="0035dd55"/>
    </style:style>
    <style:style style:name="T3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draw:style-name="fr1" draw:name="Εικόνα1" text:anchor-type="char" svg:x="0.429cm" svg:y="-1.524cm" svg:width="16.992cm" svg:height="9.91cm" draw:z-index="0"><draw:image xlink:href="Pictures/10000000000004C9000003AA2FCE49B1.png" xlink:type="simple" xlink:show="embed" xlink:actuate="onLoad" draw:mime-type="image/png"/></draw:frame>Μηχανική Μάθηση και Εφαρμογές</text:p>
      <text:p text:style-name="P2">Ιουλιανός Πολύζος</text:p>
      <text:p text:style-name="P2">2022091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Μέρος 1: Scaled Dot-Product Attention σε NumPy </text:p>
      <text:p text:style-name="P4"/>
      <text:p text:style-name="P5">Διαστάσεις και τιμές <draw:frame draw:style-name="fr2" draw:name="Αντικείμενο16" text:anchor-type="as-char" svg:y="-0.439cm" svg:width="1.998cm" svg:height="0.594cm" draw:z-index="17"><draw:object xlink:href="./Object 16" xlink:type="simple" xlink:show="embed" xlink:actuate="onLoad"/><draw:image xlink:href="./ObjectReplacements/Object 16" xlink:type="simple" xlink:show="embed" xlink:actuate="onLoad"/></draw:frame></text:p>
      <text:p text:style-name="P6">Αρχικά χρησιμοποιώντας τη βιβλιοθήκη <text:span text:style-name="T1">NumPy </text:span>φορτώνονται οι πίνακες <text:span text:style-name="T1">E , W</text:span><text:span text:style-name="T2">Q </text:span><text:span text:style-name="T3">, W</text:span><text:span text:style-name="T2">K </text:span><text:span text:style-name="T3">, W</text:span><text:span text:style-name="T2">V </text:span></text:p>
      <text:p text:style-name="P6"><text:span text:style-name="T2"/></text:p>
      <text:p text:style-name="P7">Έξοδος : </text:p>
      <text:p text:style-name="P7"/>
      <text:p text:style-name="P7">E: (8, 8)</text:p>
      <text:p text:style-name="P7">W_Q_self: (8, 4)</text:p>
      <text:p text:style-name="P7">W_K_self: (8, 4)</text:p>
      <text:p text:style-name="P7">W_V_self: (8, 6)</text:p>
      <text:p text:style-name="P7">W_Q_cross: (8, 4)</text:p>
      <text:p text:style-name="P7">W_K_cross: (8, 4)</text:p>
      <text:p text:style-name="P7">W_V_cross: (8, 6)</text:p>
      <text:p text:style-name="P7"/>
      <text:p text:style-name="P8">Από τα παραπάνω αποτελέσματα προκύπτει ότι :</text:p>
      <text:p text:style-name="P8"/>
      <text:list text:style-name="L1">
        <text:list-item>
          <text:p text:style-name="P9">Ο πίνακας Ε έχει διαστάσεις (<text:span text:style-name="T1">|V|, d</text:span><text:span text:style-name="T4">emb</text:span><text:span text:style-name="T1">) </text:span>με <text:span text:style-name="T1">d</text:span><text:span text:style-name="T4">emb </text:span><text:span text:style-name="T1">= 8</text:span></text:p>
        </text:list-item>
        <text:list-item>
          <text:p text:style-name="P10"><text:span text:style-name="T5">Για τη περίπτωση του </text:span><text:span text:style-name="T6">self - attention, </text:span><text:span text:style-name="T5">η ακολουθία εισόδου αποτελείται από την αγγλική πρόταση </text:span>“Maria isn’t here”<text:span text:style-name="T5">, επομένως </text:span><text:span text:style-name="T6">T = 3 . </text:span><text:span text:style-name="T5">Από τις διαστάσεις των πινάκων προβολής προκύπτουν </text:span><text:span text:style-name="T6">d</text:span><text:span text:style-name="T7">k </text:span><text:span text:style-name="T6">= 4 </text:span><text:span text:style-name="T5">και </text:span><text:span text:style-name="T6">d</text:span><text:span text:style-name="T7">u </text:span><text:span text:style-name="T6">= 6</text:span></text:p>
        </text:list-item>
        <text:list-item>
          <text:p text:style-name="P11"><text:span text:style-name="T5">Για τη περίπτωση του </text:span><text:span text:style-name="T6">cross – attention</text:span><text:span text:style-name="T5"> η ακολουθία εισόδου αποτελείται από την ελληνική πρόταση </text:span>“∆εν είναι εδώ η Μαρία” <text:s/><text:span text:style-name="T8">άρα </text:span><text:span text:style-name="T9">T` = 5 . </text:span><text:span text:style-name="T8">Από τις διαστάσεις των πινάκων προβολής προκύπτει ότι </text:span><text:span text:style-name="T6">d</text:span><text:span text:style-name="T7">k </text:span><text:span text:style-name="T6">= 4 </text:span><text:span text:style-name="T5">και </text:span><text:span text:style-name="T6">d</text:span><text:span text:style-name="T7">u </text:span><text:span text:style-name="T6">= 6</text:span></text:p>
          <text:p text:style-name="P11"><text:span text:style-name="T6"/></text:p>
        </text:list-item>
      </text:list>
      <text:p text:style-name="P12"><text:span text:style-name="T6"/></text:p>
      <text:p text:style-name="P13"><draw:frame text:anchor-type="as-char" svg:y="-3.84cm" draw:z-index="5" draw:name="Σχήμα1" draw:style-name="gr1" draw:text-style-name="P14" svg:width="11.498cm" svg:height="7.679cm"><draw:image xlink:href="Pictures/1003971D0000256F000018FE539E0373.svg" xlink:type="simple" xlink:show="embed" xlink:actuate="onLoad" draw:mime-type="image/svg+xml"><text:p/></draw:image><draw:image xlink:href="Pictures/10000001000001C50000012E01DF0F94.png" xlink:type="simple" xlink:show="embed" xlink:actuate="onLoad" draw:mime-type="image/png"/><svg:title>TexMaths</svg:title><svg:desc>12§latex§\begin{table}[h]
\centering
\caption{Διαστάσεις πινάκων και παραμέτρων σε self-attention και cross-attention}
\begin{tabular}{|c|c|c|}
\hline
\textbf{Παράμετρος} &amp; \textbf{Self-attention} &amp; \textbf{Cross-attention} \\
\hline
$T$ (μήκος keys/values) &amp; $3$ &amp; $3$ \\
\hline
$T'$ (μήκος queries) &amp; $3$ &amp; $5$ \\
\hline
$d_{\mathrm{emb}}$ &amp; $8$ &amp; $8$ \\
\hline
$d_k$ &amp; $4$ &amp; $4$ \\
\hline
$d_v$ &amp; $6$ &amp; $6$ \\
\hline
$W_Q$ &amp; $\mathbb{R}^{8\times4}$ &amp; $\mathbb{R}^{8\times4}$ \\
\hline
$W_K$ &amp; $\mathbb{R}^{8\times4}$ &amp; $\mathbb{R}^{8\times4}$ \\
\hline
$W_V$ &amp; $\mathbb{R}^{8\times6}$ &amp; $\mathbb{R}^{8\times6}$ \\
\hline
$Q$ &amp; $\mathbb{R}^{3\times4}$ &amp; $\mathbb{R}^{5\times4}$ \\
\hline
$K$ &amp; $\mathbb{R}^{3\times4}$ &amp; $\mathbb{R}^{3\times4}$ \\
\hline
$V$ &amp; $\mathbb{R}^{3\times6}$ &amp; $\mathbb{R}^{3\times6}$ \\
\hline
$\mathrm{Attention - A}(Q,K)$ &amp; $\mathbb{R}^{3\times3}$ &amp; $\mathbb{R}^{5\times3}$ \\
\hline
$\mathrm{Output - Y}$ &amp; $\mathbb{R}^{3\times6}$ &amp; $\mathbb{R}^{5\times6}$ \\
\hline
\end{tabular}
\label{tab:self_cross_dimensions}
\end{table}§svg§600§FALSE§</svg:desc></draw:frame></text:p>
      <text:p text:style-name="P15"><text:span text:style-name="T10"/></text:p>
      <text:p text:style-name="P15"><text:span text:style-name="T10"/></text:p>
      <text:p text:style-name="P16"><text:span text:style-name="T10"/></text:p>
      <text:p text:style-name="P17"><text:span text:style-name="T11">Ε</text:span><text:span text:style-name="T12">φαρμογή συνάρτησης</text:span></text:p>
      <text:p text:style-name="P5"><text:span text:style-name="T6"/></text:p>
      <text:p text:style-name="P18"><text:span text:style-name="T5">Έ</text:span><text:span text:style-name="T13">πειτα αφού υλοποιηθεί η συνάρτηση </text:span><text:span text:style-name="T14">def scaled_dot_product_attention(Q, K, V): </text:span><text:span text:style-name="T13">, εφαρμόζεται στο παράδειγμα </text:span><text:span text:style-name="T15">self-attention :</text:span></text:p>
      <text:p text:style-name="P19"><text:span text:style-name="T16">Ε</text:span><text:span text:style-name="T14">δώ αξίζει να σημειωθεί ότι </text:span><text:span text:style-name="T17">scores </text:span><text:span text:style-name="T14">ονομάζεται ο πολλαπλασιαμός των </text:span><text:span text:style-name="T17"><draw:frame draw:style-name="fr2" draw:name="Αντικείμενο7" text:anchor-type="as-char" svg:y="-0.439cm" svg:width="0.885cm" svg:height="0.531cm" draw:z-index="10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20"><text:span text:style-name="T14"/></text:p>
      <text:p text:style-name="P21"><text:soft-page-break/><text:span text:style-name="T14">Έξοδος στο </text:span><text:span text:style-name="T17">self-attention </text:span><text:span text:style-name="T18">όπως και στον Πίνακα 1</text:span><text:span text:style-name="T17">:</text:span></text:p>
      <text:p text:style-name="P21"><text:span text:style-name="T17"/></text:p>
      <text:p text:style-name="P22">Q shape: (3, 4)</text:p>
      <text:p text:style-name="P22">K shape: (3, 4)</text:p>
      <text:p text:style-name="P22">V shape: (3, 6)</text:p>
      <text:p text:style-name="P22">scores shape: (3, 3)</text:p>
      <text:p text:style-name="P22">A shape: (3, 3)</text:p>
      <text:p text:style-name="P22">Y shape: (3, 6)</text:p>
      <text:p text:style-name="P21"><text:span text:style-name="T17"/></text:p>
      <text:p text:style-name="P20"><text:span text:style-name="T17">Τα αποτελέσματα συμφωνούν με τη θεωρία </text:span><text:span text:style-name="T14">αφού : </text:span></text:p>
      <text:p text:style-name="P20"><text:span text:style-name="T14"/></text:p>
      <text:list text:style-name="L2">
        <text:list-item>
          <text:p text:style-name="P23"><text:span text:style-name="T14">Η πρόταση περιέχει </text:span><text:span text:style-name="T19">τρία</text:span><text:span text:style-name="T20"> </text:span><text:span text:style-name="T17">Tokens </text:span><text:span text:style-name="T14">άρα </text:span><text:span text:style-name="T14"><draw:frame draw:style-name="fr2" draw:name="Αντικείμενο14" text:anchor-type="as-char" svg:y="-0.379cm" svg:width="0.863cm" svg:height="0.471cm" draw:z-index="11"><draw:object xlink:href="./Object 14" xlink:type="simple" xlink:show="embed" xlink:actuate="onLoad"/><draw:image xlink:href="./ObjectReplacements/Object 14" xlink:type="simple" xlink:show="embed" xlink:actuate="onLoad"/></draw:frame></text:span><text:span text:style-name="T14"><text:s/></text:span><text:span text:style-name="T20">και </text:span><text:span text:style-name="T21">επίσης </text:span><text:span text:style-name="T21"><draw:frame draw:style-name="fr2" draw:name="Αντικείμενο13" text:anchor-type="as-char" svg:y="-0.379cm" svg:width="0.984cm" svg:height="0.534cm" draw:z-index="18"><draw:object xlink:href="./Object 13" xlink:type="simple" xlink:show="embed" xlink:actuate="onLoad"/><draw:image xlink:href="./ObjectReplacements/Object 13" xlink:type="simple" xlink:show="embed" xlink:actuate="onLoad"/></draw:frame></text:span><text:span text:style-name="T20"><text:s/>επομένως </text:span><text:span text:style-name="T20"><draw:frame draw:style-name="fr2" draw:name="Αντικείμενο15" text:anchor-type="as-char" svg:y="-0.439cm" svg:width="1.979cm" svg:height="0.531cm" draw:z-index="12"><draw:object xlink:href="./Object 15" xlink:type="simple" xlink:show="embed" xlink:actuate="onLoad"/><draw:image xlink:href="./ObjectReplacements/Object 15" xlink:type="simple" xlink:show="embed" xlink:actuate="onLoad"/></draw:frame></text:span><text:span text:style-name="T20"><text:s/></text:span></text:p>
        </text:list-item>
        <text:list-item>
          <text:p text:style-name="P24"><text:span text:style-name="T22">Ο </text:span><text:span text:style-name="T14">πίνακας </text:span><text:span text:style-name="T17">values </text:span><text:span text:style-name="T14">έχει διάσταση </text:span><text:span text:style-name="T17"><draw:frame draw:style-name="fr2" draw:name="Αντικείμενο3" text:anchor-type="as-char" svg:y="-0.379cm" svg:width="0.961cm" svg:height="0.534cm" draw:z-index="1"><draw:object xlink:href="./Object 3" xlink:type="simple" xlink:show="embed" xlink:actuate="onLoad"/><draw:image xlink:href="./ObjectReplacements/Object 3" xlink:type="simple" xlink:show="embed" xlink:actuate="onLoad"/></draw:frame></text:span><text:span text:style-name="T17"><text:s/></text:span><text:span text:style-name="T14">δηλαδή </text:span><text:span text:style-name="T17"><text:s/></text:span><text:span text:style-name="T17"><draw:frame draw:style-name="fr2" draw:name="Αντικείμενο4" text:anchor-type="as-char" svg:y="-0.439cm" svg:width="1.42cm" svg:height="0.531cm" draw:z-index="2"><draw:object xlink:href="./Object 4" xlink:type="simple" xlink:show="embed" xlink:actuate="onLoad"/><draw:image xlink:href="./ObjectReplacements/Object 4" xlink:type="simple" xlink:show="embed" xlink:actuate="onLoad"/></draw:frame></text:span><text:span text:style-name="T17"><text:s/></text:span></text:p>
        </text:list-item>
        <text:list-item>
          <text:p text:style-name="P24"><text:span text:style-name="T14">Ο πίνακας προσοχής έχει διαστάσεις </text:span><text:span text:style-name="T14"><draw:frame draw:style-name="fr2" draw:name="Αντικείμενο5" text:anchor-type="as-char" svg:y="-0.439cm" svg:width="1.425cm" svg:height="0.531cm" draw:z-index="3"><draw:object xlink:href="./Object 5" xlink:type="simple" xlink:show="embed" xlink:actuate="onLoad"/><draw:image xlink:href="./ObjectReplacements/Object 5" xlink:type="simple" xlink:show="embed" xlink:actuate="onLoad"/></draw:frame></text:span></text:p>
        </text:list-item>
        <text:list-item>
          <text:p text:style-name="P24"><text:span text:style-name="T14">Το τελικό αποτέλεσμα έχει διαστάσεις </text:span><text:span text:style-name="T17"><draw:frame draw:style-name="fr2" draw:name="Αντικείμενο6" text:anchor-type="as-char" svg:y="-0.439cm" svg:width="1.393cm" svg:height="0.531cm" draw:z-index="4"><draw:object xlink:href="./Object 6" xlink:type="simple" xlink:show="embed" xlink:actuate="onLoad"/><draw:image xlink:href="./ObjectReplacements/Object 6" xlink:type="simple" xlink:show="embed" xlink:actuate="onLoad"/></draw:frame></text:span></text:p>
        </text:list-item>
      </text:list>
      <text:p text:style-name="P12"><text:span text:style-name="T6"/></text:p>
      <text:p text:style-name="P25"><text:span text:style-name="T23">Γ</text:span><text:span text:style-name="T14">ια τη περίπτωση της εφαρμογής της εν λόγω συνάρτησης στη περίπτωση του </text:span><text:span text:style-name="T17">cross – attention </text:span><text:span text:style-name="T14">αντίστοιχα όπως στον Πίνακα 1 είναι :</text:span></text:p>
      <text:p text:style-name="P25"><text:span text:style-name="T14"/></text:p>
      <text:p text:style-name="P26">Q shape: (5, 4)</text:p>
      <text:p text:style-name="P26">K shape: (3, 4)</text:p>
      <text:p text:style-name="P26">V shape: (3, 6)</text:p>
      <text:p text:style-name="P26">scores shape: (5, 3)</text:p>
      <text:p text:style-name="P26">A shape: (5, 3)</text:p>
      <text:p text:style-name="P26">Y shape: (5, 6)</text:p>
      <text:p text:style-name="P25"><text:span text:style-name="T14"/></text:p>
      <text:p text:style-name="P20"><text:span text:style-name="T17">Τα αποτελέσματα συμφωνούν με τη θεωρία </text:span><text:span text:style-name="T14">αφού : </text:span></text:p>
      <text:p text:style-name="P20"><text:span text:style-name="T14"/></text:p>
      <text:list text:style-name="L3">
        <text:list-item>
          <text:p text:style-name="P27"><text:span text:style-name="T14">Η </text:span><text:span text:style-name="T20">ελληνική </text:span><text:span text:style-name="T14">πρόταση περιέχει </text:span><text:span text:style-name="T20">πέντε </text:span><text:span text:style-name="T17">Tokens </text:span><text:span text:style-name="T14">άρα </text:span><text:span text:style-name="T14"><draw:frame draw:style-name="fr2" draw:name="Αντικείμενο1" text:anchor-type="as-char" svg:y="-0.439cm" svg:width="0.933cm" svg:height="0.531cm" draw:z-index="6"><draw:object xlink:href="./Object 1" xlink:type="simple" xlink:show="embed" xlink:actuate="onLoad"/><draw:image xlink:href="./ObjectReplacements/Object 1" xlink:type="simple" xlink:show="embed" xlink:actuate="onLoad"/><svg:desc>τύπος</svg:desc></draw:frame></text:span><text:span text:style-name="T14"><text:s/></text:span><text:span text:style-name="T20">και επομένως </text:span><text:span text:style-name="T20"><draw:frame draw:style-name="fr2" draw:name="Αντικείμενο2" text:anchor-type="as-char" svg:y="-0.439cm" svg:width="1.427cm" svg:height="0.531cm" draw:z-index="7"><draw:object xlink:href="./Object 2" xlink:type="simple" xlink:show="embed" xlink:actuate="onLoad"/><draw:image xlink:href="./ObjectReplacements/Object 2" xlink:type="simple" xlink:show="embed" xlink:actuate="onLoad"/><svg:desc>τύπος</svg:desc></draw:frame></text:span></text:p>
        </text:list-item>
        <text:list-item>
          <text:p text:style-name="P28"><text:span text:style-name="T22">Η </text:span><text:span text:style-name="T14">αγγλική πρόταση περιέχει </text:span><text:span text:style-name="T19">τρία </text:span><text:span text:style-name="T24">Tokens </text:span><text:span text:style-name="T19">άρα </text:span><text:span text:style-name="T24">T = 3 </text:span><text:span text:style-name="T19">και επομένως </text:span><text:span text:style-name="T19"><draw:frame draw:style-name="fr2" draw:name="Αντικείμενο8" text:anchor-type="as-char" svg:y="-0.439cm" svg:width="1.459cm" svg:height="0.531cm" draw:z-index="8"><draw:object xlink:href="./Object 8" xlink:type="simple" xlink:show="embed" xlink:actuate="onLoad"/><draw:image xlink:href="./ObjectReplacements/Object 8" xlink:type="simple" xlink:show="embed" xlink:actuate="onLoad"/><svg:desc>τύπος</svg:desc></draw:frame></text:span><text:span text:style-name="T19"><text:s/>.</text:span></text:p>
        </text:list-item>
        <text:list-item>
          <text:p text:style-name="P29"><text:span text:style-name="T22">Ο </text:span><text:span text:style-name="T14">πίνακας </text:span><text:span text:style-name="T17">values </text:span><text:span text:style-name="T14">έχει διάσταση </text:span><text:span text:style-name="T17"><draw:frame draw:style-name="fr2" draw:name="Αντικείμενο9" text:anchor-type="as-char" svg:y="-0.379cm" svg:width="0.961cm" svg:height="0.534cm" draw:z-index="9"><draw:object xlink:href="./Object 9" xlink:type="simple" xlink:show="embed" xlink:actuate="onLoad"/><draw:image xlink:href="./ObjectReplacements/Object 9" xlink:type="simple" xlink:show="embed" xlink:actuate="onLoad"/><svg:desc>τύπος</svg:desc></draw:frame></text:span><text:span text:style-name="T17"><text:s/></text:span><text:span text:style-name="T14">δηλαδή </text:span><text:span text:style-name="T17"><text:s/></text:span><text:span text:style-name="T17"><draw:frame draw:style-name="fr2" draw:name="Αντικείμενο10" text:anchor-type="as-char" svg:y="-0.439cm" svg:width="1.42cm" svg:height="0.531cm" draw:z-index="13"><draw:object xlink:href="./Object 10" xlink:type="simple" xlink:show="embed" xlink:actuate="onLoad"/><draw:image xlink:href="./ObjectReplacements/Object 10" xlink:type="simple" xlink:show="embed" xlink:actuate="onLoad"/><svg:desc>τύπος</svg:desc></draw:frame></text:span></text:p>
        </text:list-item>
        <text:list-item>
          <text:p text:style-name="P29"><text:span text:style-name="T14">Ο πίνακας προσοχής έχει διαστάσεις </text:span><text:span text:style-name="T14"><draw:frame draw:style-name="fr2" draw:name="Αντικείμενο11" text:anchor-type="as-char" svg:y="-0.439cm" svg:width="1.423cm" svg:height="0.531cm" draw:z-index="14"><draw:object xlink:href="./Object 11" xlink:type="simple" xlink:show="embed" xlink:actuate="onLoad"/><draw:image xlink:href="./ObjectReplacements/Object 11" xlink:type="simple" xlink:show="embed" xlink:actuate="onLoad"/><svg:desc>τύπος</svg:desc></draw:frame></text:span></text:p>
        </text:list-item>
        <text:list-item>
          <text:p text:style-name="P29"><text:span text:style-name="T14">Το τελικό αποτέλεσμα έχει διαστάσεις </text:span><text:span text:style-name="T17"><draw:frame draw:style-name="fr2" draw:name="Αντικείμενο12" text:anchor-type="as-char" svg:y="-0.439cm" svg:width="1.392cm" svg:height="0.531cm" draw:z-index="15"><draw:object xlink:href="./Object 12" xlink:type="simple" xlink:show="embed" xlink:actuate="onLoad"/><draw:image xlink:href="./ObjectReplacements/Object 12" xlink:type="simple" xlink:show="embed" xlink:actuate="onLoad"/><svg:desc>τύπος</svg:desc></draw:frame></text:span></text:p>
        </text:list-item>
      </text:list>
      <text:p text:style-name="P30"><text:span text:style-name="T17"/></text:p>
      <text:p text:style-name="P30"><text:span text:style-name="T17"/></text:p>
      <text:h text:style-name="P31" text:outline-level="3">Επαλήθευση της υλοποίησης με χρήση PyTorch</text:h>
      <text:p text:style-name="P32"/>
      <text:p text:style-name="P33"><text:span text:style-name="T25">Για να επιβεβαιωθεί η ορθότητα της υλοποίησης του μηχανισμού </text:span><text:span text:style-name="Strong_20_Emphasis"><text:span text:style-name="T26">scaled dot-product attention</text:span></text:span><text:span text:style-name="T25"> σε NumPy, τα αποτελέσματά της </text:span><text:span text:style-name="T27">συγκρίθηκαν</text:span><text:span text:style-name="T25"> με την αντίστοιχη υλοποίηση που παρέχει η βιβλιοθήκη PyTorch μέσω της συνάρτησης </text:span>torch.nn.functional.scaled_dot_product_attention.</text:p>
      <text:p text:style-name="P34"><text:span text:style-name="T28">Αρχικά, οι πίνακες </text:span><text:span text:style-name="Source_20_Text"><text:span text:style-name="T28">Q</text:span></text:span><text:span text:style-name="T28">, </text:span><text:span text:style-name="Source_20_Text"><text:span text:style-name="T28">K</text:span></text:span><text:span text:style-name="T28"> και </text:span><text:span text:style-name="Source_20_Text"><text:span text:style-name="T28">V</text:span></text:span><text:span text:style-name="T28">, οι οποίοι είχαν υπολογιστεί ως πίνακες NumPy, μετατράπηκαν σε αντικείμενα τύπου </text:span><text:span text:style-name="Source_20_Text"><text:span text:style-name="T28">torch.Tensor</text:span></text:span><text:span text:style-name="T28"> με μορφή </text:span><text:span text:style-name="Source_20_Text"><text:span text:style-name="T28">float32</text:span></text:span><text:span text:style-name="T28">:</text:span></text:p>
      <text:p text:style-name="P35"><text:span text:style-name="T29">Στη συνέχεια, εφαρμόστηκε η συνάρτηση του PyTorch με παράμετρο </text:span><text:span text:style-name="T30">scale=1.0 / np.sqrt(d_k) </text:span><text:span text:style-name="T29">ώστε να υλοποιηθεί ο παράγοντας κλιμάκωσης </text:span><text:span text:style-name="T29"><draw:frame draw:style-name="fr2" draw:name="Αντικείμενο17" text:anchor-type="as-char" svg:y="-0.427cm" svg:width="1.351cm" svg:height="0.582cm" draw:z-index="16"><draw:object xlink:href="./Object 17" xlink:type="simple" xlink:show="embed" xlink:actuate="onLoad"/><draw:image xlink:href="./ObjectReplacements/Object 17" xlink:type="simple" xlink:show="embed" xlink:actuate="onLoad"/></draw:frame></text:span></text:p>
      <text:p text:style-name="P35"><text:span text:style-name="T29"><text:s/></text:span><text:span text:style-name="T28">Το αποτέλεσμα της PyTorch επιστράφηκε ως </text:span><text:span text:style-name="Source_20_Text"><text:span text:style-name="T28">torch.Tensor</text:span></text:span><text:span text:style-name="T28"> και μετατράπηκε ξανά σε πίνακα NumPy </text:span><text:span text:style-name="T29">μέσω της μεθόδου </text:span><text:span text:style-name="T31">detach </text:span><text:span text:style-name="T29">η οποία αποσυνδέει το tensor από το υπολογιστικό γράφημα του </text:span><text:soft-page-break/><text:span text:style-name="T29">PyTorch, καθώς δεν απαιτείται υπολογισμός παραγώγων κατά τη διαδικασία επαλήθευσης. Η μετατροπή σε NumPy επιτρέπει την άμεση σύγκριση των δύο αποτελεσμάτων. </text:span></text:p>
      <text:p text:style-name="P35"><text:span text:style-name="T29"/></text:p>
      <text:p text:style-name="P35"><text:span text:style-name="T29">Η σύγκριση πραγματοποιήθηκε με τη συνάρτηση </text:span><text:span text:style-name="Source_20_Text"><text:span text:style-name="T28">np.allclose(Y_numpy, Y_torch_np, atol=1e-5)</text:span></text:span></text:p>
      <text:p text:style-name="P35"><text:span text:style-name="Source_20_Text"><text:span text:style-name="T29">Έξοδος :</text:span></text:span></text:p>
      <text:p text:style-name="P35"><text:span text:style-name="Source_20_Text"><text:span text:style-name="T29">Self-attention agreement: True</text:span></text:span></text:p>
      <text:p text:style-name="P35"><text:span text:style-name="Source_20_Text"><text:span text:style-name="T29">Cross-attention agreement: True</text:span></text:span></text:p>
      <text:p text:style-name="P35"><text:span text:style-name="Source_20_Text"><text:span text:style-name="T29"/></text:span></text:p>
      <text:p text:style-name="P35"><text:span text:style-name="Source_20_Text"><text:span text:style-name="T29">Το γεγονός ότι και στις δύο περιπτώσεις η συνάρτηση np.allclose επέστρεψε την τιμή True δείχνει ότι τα αποτελέσματα της υλοποίησης σε NumPy συμπίπτουν με εκείνα της επίσημης υλοποίησης του PyTorch, με διαφορά μικρότερη από </text:span></text:span><text:span text:style-name="Source_20_Text"><text:span text:style-name="T31">10</text:span></text:span><text:span text:style-name="Source_20_Text"><text:span text:style-name="T32">-5</text:span></text:span><text:span text:style-name="Source_20_Text"><text:span text:style-name="T29">. Συνεπώς, μπορεί να γίνει κατανοητό ότι η υλοποίηση του scaled dot-product attention που αναπτύχθηκε σε NumPy είναι ορθή και αριθμητικά συνεπής με την αντίστοιχη υλοποίηση της PyTorch. </text:span></text:span></text:p>
      <text:p text:style-name="P35"><text:span text:style-name="Source_20_Text"><text:span text:style-name="T29"/></text:span></text:p>
      <text:p text:style-name="P36">Απεικόνιση πινάκων προσοχής και σχολιασμός</text:p>
      <text:p text:style-name="P30"><text:span text:style-name="T17"/></text:p>
      <text:list text:continue-numbering="true" text:style-name="L3">
        <text:list-header>
          <text:p text:style-name="P37"><text:span text:style-name="T6"/></text:p>
        </text:list-header>
      </text:list>
      <text:p text:style-name="P38"><text:span text:style-name="T14"/></text:p>
      <text:p text:style-name="P25"><text:span text:style-name="T14"/></text:p>
      <text:p text:style-name="P25"><text:span text:style-name="T14"/></text:p>
      <text:p text:style-name="P25"><text:span text:style-name="T14"/></text:p>
      <text:p text:style-name="P25"><text:span text:style-name="T14"/></text:p>
      <text:p text:style-name="P39">Μέρος 2: Ανάλυση παραμέτρων κωδικοποιητή μετασχηματιστή </text:p>
      <text:p text:style-name="P39"/>
      <text:p text:style-name="P40">Αριθμός συνολικών παραμέτρων : <text:span text:style-name="T33">133642</text:span></text:p>
      <text:p text:style-name="P39"/>
      <table:table table:name="Πίνακας1" table:style-name="Πίνακας1" table:template-name="Simple Grid Rows">
        <table:table-column table:style-name="Πίνακας1.A"/>
        <table:table-column table:style-name="Πίνακας1.B"/>
        <table:table-column table:style-name="Πίνακας1.C"/>
        <table:table-column table:style-name="Πίνακας1.D"/>
        <table:table-row>
          <table:table-cell table:style-name="Πίνακας1.A1" office:value-type="string">
            <text:p text:style-name="P41">Παράμετρος </text:p>
          </table:table-cell>
          <table:table-cell table:style-name="Πίνακας1.B1" office:value-type="string">
            <text:p text:style-name="P41">Ρόλος</text:p>
          </table:table-cell>
          <table:table-cell table:style-name="Πίνακας1.B1" office:value-type="string">
            <text:p text:style-name="P41">Διάσταση</text:p>
          </table:table-cell>
          <table:table-cell table:style-name="Πίνακας1.A1" office:value-type="string">
            <text:p text:style-name="P41">Πως προκύπτει η διάσταση</text:p>
          </table:table-cell>
        </table:table-row>
        <table:table-row>
          <table:table-cell table:style-name="Πίνακας1.A2" office:value-type="string">
            <text:p text:style-name="P42">token_emb.weight</text:p>
          </table:table-cell>
          <table:table-cell table:style-name="Πίνακας1.B2" office:value-type="string">
            <text:p text:style-name="P42">Πίνακας embeddings που αντιστοιχίζει κάθε token του λεξιλογίου σε διάνυσμα χαρακτηριστικών. </text:p>
          </table:table-cell>
          <table:table-cell table:style-name="Πίνακας1.C2" office:value-type="string">
            <text:p text:style-name="P42">(1000, 64)</text:p>
          </table:table-cell>
          <table:table-cell table:style-name="Πίνακας1.D2" office:value-type="string">
            <text:p text:style-name="P42">vocab_size × d_model = 1000 × 64 </text:p>
          </table:table-cell>
        </table:table-row>
        <table:table-row>
          <table:table-cell table:style-name="Πίνακας1.A3" office:value-type="string">
            <text:p text:style-name="P42">pos_emb.weight</text:p>
          </table:table-cell>
          <table:table-cell table:style-name="Πίνακας1.B3" office:value-type="string">
            <text:p text:style-name="P42">Positional embeddings που κωδικοποιούν τη θέση κάθε token στην ακολουθία. </text:p>
          </table:table-cell>
          <table:table-cell table:style-name="Πίνακας1.C3" office:value-type="string">
            <text:p text:style-name="P42">(32, 64)</text:p>
          </table:table-cell>
          <table:table-cell table:style-name="Πίνακας1.D3" office:value-type="string">
            <text:p text:style-name="P42">max_seq_len × d_model = 32 × 64 </text:p>
          </table:table-cell>
        </table:table-row>
        <table:table-row>
          <table:table-cell table:style-name="Πίνακας1.A2" office:value-type="string">
            <text:p text:style-name="P42">encoder.layers.0.self_attn.in_proj_weight</text:p>
          </table:table-cell>
          <table:table-cell table:style-name="Πίνακας1.B4" office:value-type="string">
            <text:p text:style-name="P42">Βάρη των προβολών Query, Key και Value του self-attention. </text:p>
          </table:table-cell>
          <table:table-cell table:style-name="Πίνακας1.C4" office:value-type="string">
            <text:p text:style-name="P42">(192, 64)</text:p>
          </table:table-cell>
          <table:table-cell table:style-name="Πίνακας1.D4" office:value-type="string">
            <text:p text:style-name="P43"><text:span text:style-name="Source_20_Text"><text:span text:style-name="T28">3 × d_model × d_model = 3 × 64 × 64</text:span></text:span><text:span text:style-name="T28">, επειδή ενώνονται οι πίνακες των Q, K και V. </text:span></text:p>
          </table:table-cell>
        </table:table-row>
        <table:table-row>
          <table:table-cell table:style-name="Πίνακας1.A3" office:value-type="string">
            <text:p text:style-name="P42">encoder.layers.0.self_attn.in_proj_bias</text:p>
          </table:table-cell>
          <table:table-cell table:style-name="Πίνακας1.B5" office:value-type="string">
            <text:p text:style-name="P42">Bias των προβολών Query, Key και Value. </text:p>
          </table:table-cell>
          <table:table-cell table:style-name="Πίνακας1.C5" office:value-type="string">
            <text:p text:style-name="P42">(192,)</text:p>
          </table:table-cell>
          <table:table-cell table:style-name="Πίνακας1.D5" office:value-type="string">
            <text:p text:style-name="P42">3 × d_model = 3 × 64 </text:p>
          </table:table-cell>
        </table:table-row>
        <text:soft-page-break/>
        <table:table-row>
          <table:table-cell table:style-name="Πίνακας1.A2" office:value-type="string">
            <text:p text:style-name="P42">encoder.layers.0.self_attn.out_proj.weight</text:p>
          </table:table-cell>
          <table:table-cell table:style-name="Πίνακας1.B6" office:value-type="string">
            <text:p text:style-name="P42">Τελική προβολή μετά τη συνένωση των attention heads. </text:p>
          </table:table-cell>
          <table:table-cell table:style-name="Πίνακας1.C6" office:value-type="string">
            <text:p text:style-name="P42">(64, 64)</text:p>
          </table:table-cell>
          <table:table-cell table:style-name="Πίνακας1.D6" office:value-type="string">
            <text:p text:style-name="P42">d_model × d_model = 64 × 64 </text:p>
          </table:table-cell>
        </table:table-row>
        <table:table-row>
          <table:table-cell table:style-name="Πίνακας1.A3" office:value-type="string">
            <text:p text:style-name="P42">encoder.layers.0.self_attn.out_proj.bias</text:p>
          </table:table-cell>
          <table:table-cell table:style-name="Πίνακας1.B7" office:value-type="string">
            <text:p text:style-name="P42">Bias της τελικής προβολής του attention. </text:p>
          </table:table-cell>
          <table:table-cell table:style-name="Πίνακας1.C7" office:value-type="string">
            <text:p text:style-name="P42">(64,)</text:p>
          </table:table-cell>
          <table:table-cell table:style-name="Πίνακας1.D7" office:value-type="string">
            <text:p text:style-name="P42">d_model = 64 </text:p>
          </table:table-cell>
        </table:table-row>
        <table:table-row>
          <table:table-cell table:style-name="Πίνακας1.A2" office:value-type="string">
            <text:p text:style-name="P42">encoder.layers.0.linear1.weight</text:p>
          </table:table-cell>
          <table:table-cell table:style-name="Πίνακας1.B8" office:value-type="string">
            <text:p text:style-name="P42">Πρώτος γραμμικός μετασχηματισμός του Feed Forward Network (MLP). </text:p>
          </table:table-cell>
          <table:table-cell table:style-name="Πίνακας1.C8" office:value-type="string">
            <text:p text:style-name="P42">(128, 64)</text:p>
          </table:table-cell>
          <table:table-cell table:style-name="Πίνακας1.D8" office:value-type="string">
            <text:p text:style-name="P42">d_ff × d_model = 128 × 64 </text:p>
          </table:table-cell>
        </table:table-row>
        <table:table-row>
          <table:table-cell table:style-name="Πίνακας1.A3" office:value-type="string">
            <text:p text:style-name="P42">encoder.layers.0.linear1.bias</text:p>
          </table:table-cell>
          <table:table-cell table:style-name="Πίνακας1.B9" office:value-type="string">
            <text:p text:style-name="P42">Bias του πρώτου γραμμικού επιπέδου του MLP. </text:p>
          </table:table-cell>
          <table:table-cell table:style-name="Πίνακας1.C9" office:value-type="string">
            <text:p text:style-name="P42">(128,)</text:p>
          </table:table-cell>
          <table:table-cell table:style-name="Πίνακας1.D9" office:value-type="string">
            <text:p text:style-name="P42">d_ff = 128 </text:p>
          </table:table-cell>
        </table:table-row>
        <table:table-row>
          <table:table-cell table:style-name="Πίνακας1.A2" office:value-type="string">
            <text:p text:style-name="P42">encoder.layers.0.linear2.weight</text:p>
          </table:table-cell>
          <table:table-cell table:style-name="Πίνακας1.B10" office:value-type="string">
            <text:p text:style-name="P42">Δεύτερος γραμμικός μετασχηματισμός του MLP. </text:p>
          </table:table-cell>
          <table:table-cell table:style-name="Πίνακας1.C10" office:value-type="string">
            <text:p text:style-name="P42">(64, 128)</text:p>
          </table:table-cell>
          <table:table-cell table:style-name="Πίνακας1.D10" office:value-type="string">
            <text:p text:style-name="P42">d_model × d_ff = 64 × 128 </text:p>
          </table:table-cell>
        </table:table-row>
        <table:table-row>
          <table:table-cell table:style-name="Πίνακας1.A3" office:value-type="string">
            <text:p text:style-name="P42">encoder.layers.0.linear2.bias</text:p>
          </table:table-cell>
          <table:table-cell table:style-name="Πίνακας1.B11" office:value-type="string">
            <text:p text:style-name="P42">Bias του δεύτερου γραμμικού επιπέδου του MLP. </text:p>
          </table:table-cell>
          <table:table-cell table:style-name="Πίνακας1.C11" office:value-type="string">
            <text:p text:style-name="P42">(64,)</text:p>
          </table:table-cell>
          <table:table-cell table:style-name="Πίνακας1.D11" office:value-type="string">
            <text:p text:style-name="P42">d_model = 64 </text:p>
          </table:table-cell>
        </table:table-row>
        <table:table-row>
          <table:table-cell table:style-name="Πίνακας1.A2" office:value-type="string">
            <text:p text:style-name="P42">encoder.layers.0.norm1.weight</text:p>
          </table:table-cell>
          <table:table-cell table:style-name="Πίνακας1.B12" office:value-type="string">
            <text:p text:style-name="P42">Παράμετρος κλίμακας (γ) της πρώτης LayerNorm. </text:p>
          </table:table-cell>
          <table:table-cell table:style-name="Πίνακας1.C12" office:value-type="string">
            <text:p text:style-name="P42">(64,)</text:p>
          </table:table-cell>
          <table:table-cell table:style-name="Πίνακας1.D12" office:value-type="string">
            <text:p text:style-name="P42">d_model = 64 </text:p>
          </table:table-cell>
        </table:table-row>
        <table:table-row>
          <table:table-cell table:style-name="Πίνακας1.A3" office:value-type="string">
            <text:p text:style-name="P42">encoder.layers.0.norm1.bias</text:p>
          </table:table-cell>
          <table:table-cell table:style-name="Πίνακας1.B13" office:value-type="string">
            <text:p text:style-name="P42">Παράμετρος μετατόπισης (β) της πρώτης LayerNorm. </text:p>
          </table:table-cell>
          <table:table-cell table:style-name="Πίνακας1.C13" office:value-type="string">
            <text:p text:style-name="P42">(64,)</text:p>
          </table:table-cell>
          <table:table-cell table:style-name="Πίνακας1.D13" office:value-type="string">
            <text:p text:style-name="P42">d_model = 64 </text:p>
          </table:table-cell>
        </table:table-row>
        <table:table-row>
          <table:table-cell table:style-name="Πίνακας1.A2" office:value-type="string">
            <text:p text:style-name="P42">encoder.layers.0.norm2.weight</text:p>
          </table:table-cell>
          <table:table-cell table:style-name="Πίνακας1.B14" office:value-type="string">
            <text:p text:style-name="P42">Παράμετρος κλίμακας (γ) της δεύτερης LayerNorm. </text:p>
          </table:table-cell>
          <table:table-cell table:style-name="Πίνακας1.C14" office:value-type="string">
            <text:p text:style-name="P42">(64,)</text:p>
          </table:table-cell>
          <table:table-cell table:style-name="Πίνακας1.D14" office:value-type="string">
            <text:p text:style-name="P42">d_model = 64 </text:p>
          </table:table-cell>
        </table:table-row>
        <table:table-row>
          <table:table-cell table:style-name="Πίνακας1.A3" office:value-type="string">
            <text:p text:style-name="P42">encoder.layers.0.norm2.bias</text:p>
          </table:table-cell>
          <table:table-cell table:style-name="Πίνακας1.B15" office:value-type="string">
            <text:p text:style-name="P42">Παράμετρος μετατόπισης (β) της δεύτερης LayerNorm. </text:p>
          </table:table-cell>
          <table:table-cell table:style-name="Πίνακας1.C15" office:value-type="string">
            <text:p text:style-name="P42">(64,)</text:p>
          </table:table-cell>
          <table:table-cell table:style-name="Πίνακας1.D15" office:value-type="string">
            <text:p text:style-name="P42">d_model = 64 </text:p>
          </table:table-cell>
        </table:table-row>
        <table:table-row>
          <table:table-cell table:style-name="Πίνακας1.A2" office:value-type="string">
            <text:p text:style-name="P42">encoder.layers.1.self_attn.in_proj_weight</text:p>
          </table:table-cell>
          <table:table-cell table:style-name="Πίνακας1.B16" office:value-type="string">
            <text:p text:style-name="P42">Βάρη των προβολών Query, Key και Value του δεύτερου encoder layer. </text:p>
          </table:table-cell>
          <table:table-cell table:style-name="Πίνακας1.C16" office:value-type="string">
            <text:p text:style-name="P42">(192, 64)</text:p>
          </table:table-cell>
          <table:table-cell table:style-name="Πίνακας1.D16" office:value-type="string">
            <text:p text:style-name="P42">3 × d_model × d_model = 3 × 64 × 64 </text:p>
          </table:table-cell>
        </table:table-row>
        <table:table-row>
          <table:table-cell table:style-name="Πίνακας1.A3" office:value-type="string">
            <text:p text:style-name="P42">encoder.layers.1.self_attn.in_proj_bias</text:p>
          </table:table-cell>
          <table:table-cell table:style-name="Πίνακας1.B17" office:value-type="string">
            <text:p text:style-name="P42">Bias των προβολών Query, Key και Value του δεύτερου encoder layer. </text:p>
          </table:table-cell>
          <table:table-cell table:style-name="Πίνακας1.C17" office:value-type="string">
            <text:p text:style-name="P42">(192,)</text:p>
          </table:table-cell>
          <table:table-cell table:style-name="Πίνακας1.D17" office:value-type="string">
            <text:p text:style-name="P42">3 × d_model = 3 × 64 </text:p>
          </table:table-cell>
        </table:table-row>
        <table:table-row>
          <table:table-cell table:style-name="Πίνακας1.A2" office:value-type="string">
            <text:p text:style-name="P42">encoder.layers.1.self_attn.out_proj.weight</text:p>
          </table:table-cell>
          <table:table-cell table:style-name="Πίνακας1.B18" office:value-type="string">
            <text:p text:style-name="P42">Τελική προβολή του attention στο δεύτερο encoder layer. </text:p>
          </table:table-cell>
          <table:table-cell table:style-name="Πίνακας1.C18" office:value-type="string">
            <text:p text:style-name="P42">(64, 64)</text:p>
          </table:table-cell>
          <table:table-cell table:style-name="Πίνακας1.D18" office:value-type="string">
            <text:p text:style-name="P42">d_model × d_model = 64 × 64 </text:p>
          </table:table-cell>
        </table:table-row>
        <table:table-row>
          <table:table-cell table:style-name="Πίνακας1.A3" office:value-type="string">
            <text:p text:style-name="P42">encoder.layers.1.self_attn.out_proj.bias</text:p>
          </table:table-cell>
          <table:table-cell table:style-name="Πίνακας1.B19" office:value-type="string">
            <text:p text:style-name="P42">Bias της τελικής προβολής του attention. </text:p>
          </table:table-cell>
          <table:table-cell table:style-name="Πίνακας1.C19" office:value-type="string">
            <text:p text:style-name="P42">(64,)</text:p>
          </table:table-cell>
          <table:table-cell table:style-name="Πίνακας1.D19" office:value-type="string">
            <text:p text:style-name="P42">d_model = 64 </text:p>
          </table:table-cell>
        </table:table-row>
        <table:table-row>
          <table:table-cell table:style-name="Πίνακας1.A2" office:value-type="string">
            <text:p text:style-name="P42">encoder.layers.1.linear1.weight</text:p>
          </table:table-cell>
          <table:table-cell table:style-name="Πίνακας1.B20" office:value-type="string">
            <text:p text:style-name="P42">Πρώτος γραμμικός μετασχηματισμός του MLP στο δεύτερο layer. </text:p>
          </table:table-cell>
          <table:table-cell table:style-name="Πίνακας1.C20" office:value-type="string">
            <text:p text:style-name="P42">(128, 64)</text:p>
          </table:table-cell>
          <table:table-cell table:style-name="Πίνακας1.D20" office:value-type="string">
            <text:p text:style-name="P42">d_ff × d_model = 128 × 64 </text:p>
          </table:table-cell>
        </table:table-row>
        <table:table-row>
          <table:table-cell table:style-name="Πίνακας1.A3" office:value-type="string">
            <text:p text:style-name="P42">encoder.layers.1.linear1.bias</text:p>
          </table:table-cell>
          <table:table-cell table:style-name="Πίνακας1.B21" office:value-type="string">
            <text:p text:style-name="P42">Bias του πρώτου γραμμικού επιπέδου <text:soft-page-break/>του MLP. </text:p>
          </table:table-cell>
          <table:table-cell table:style-name="Πίνακας1.C21" office:value-type="string">
            <text:p text:style-name="P42">(128,)</text:p>
          </table:table-cell>
          <table:table-cell table:style-name="Πίνακας1.D21" office:value-type="string">
            <text:p text:style-name="P42">d_ff = 128 </text:p>
          </table:table-cell>
        </table:table-row>
        <table:table-row>
          <table:table-cell table:style-name="Πίνακας1.A2" office:value-type="string">
            <text:p text:style-name="P42">encoder.layers.1.linear2.weight</text:p>
          </table:table-cell>
          <table:table-cell table:style-name="Πίνακας1.B22" office:value-type="string">
            <text:p text:style-name="P42">Δεύτερος γραμμικός μετασχηματισμός του MLP στο δεύτερο layer. </text:p>
          </table:table-cell>
          <table:table-cell table:style-name="Πίνακας1.C22" office:value-type="string">
            <text:p text:style-name="P42">(64, 128)</text:p>
          </table:table-cell>
          <table:table-cell table:style-name="Πίνακας1.D22" office:value-type="string">
            <text:p text:style-name="P42">d_model × d_ff = 64 × 128 </text:p>
          </table:table-cell>
        </table:table-row>
        <table:table-row>
          <table:table-cell table:style-name="Πίνακας1.A3" office:value-type="string">
            <text:p text:style-name="P42">encoder.layers.1.linear2.bias</text:p>
          </table:table-cell>
          <table:table-cell table:style-name="Πίνακας1.B23" office:value-type="string">
            <text:p text:style-name="P42">Bias του δεύτερου γραμμικού επιπέδου του MLP. </text:p>
          </table:table-cell>
          <table:table-cell table:style-name="Πίνακας1.C23" office:value-type="string">
            <text:p text:style-name="P42">(64,)</text:p>
          </table:table-cell>
          <table:table-cell table:style-name="Πίνακας1.D23" office:value-type="string">
            <text:p text:style-name="P42">d_model = 64 </text:p>
          </table:table-cell>
        </table:table-row>
        <table:table-row>
          <table:table-cell table:style-name="Πίνακας1.A2" office:value-type="string">
            <text:p text:style-name="P42">encoder.layers.1.norm1.weight</text:p>
          </table:table-cell>
          <table:table-cell table:style-name="Πίνακας1.B24" office:value-type="string">
            <text:p text:style-name="P42">Παράμετρος κλίμακας (γ) της πρώτης LayerNorm του δεύτερου layer. </text:p>
          </table:table-cell>
          <table:table-cell table:style-name="Πίνακας1.C24" office:value-type="string">
            <text:p text:style-name="P42">(64,)</text:p>
          </table:table-cell>
          <table:table-cell table:style-name="Πίνακας1.D24" office:value-type="string">
            <text:p text:style-name="P42">d_model = 64 </text:p>
          </table:table-cell>
        </table:table-row>
        <table:table-row>
          <table:table-cell table:style-name="Πίνακας1.A3" office:value-type="string">
            <text:p text:style-name="P42">encoder.layers.1.norm1.bias</text:p>
          </table:table-cell>
          <table:table-cell table:style-name="Πίνακας1.B25" office:value-type="string">
            <text:p text:style-name="P42">Παράμετρος μετατόπισης (β) της πρώτης LayerNorm του δεύτερου layer. </text:p>
          </table:table-cell>
          <table:table-cell table:style-name="Πίνακας1.C25" office:value-type="string">
            <text:p text:style-name="P42">(64,)</text:p>
          </table:table-cell>
          <table:table-cell table:style-name="Πίνακας1.D25" office:value-type="string">
            <text:p text:style-name="P42">d_model = 64 </text:p>
          </table:table-cell>
        </table:table-row>
        <table:table-row>
          <table:table-cell table:style-name="Πίνακας1.A2" office:value-type="string">
            <text:p text:style-name="P42">encoder.layers.1.norm2.weight</text:p>
          </table:table-cell>
          <table:table-cell table:style-name="Πίνακας1.B26" office:value-type="string">
            <text:p text:style-name="P42">Παράμετρος κλίμακας (γ) της δεύτερης LayerNorm του δεύτερου layer. </text:p>
          </table:table-cell>
          <table:table-cell table:style-name="Πίνακας1.C26" office:value-type="string">
            <text:p text:style-name="P42">(64,)</text:p>
          </table:table-cell>
          <table:table-cell table:style-name="Πίνακας1.D26" office:value-type="string">
            <text:p text:style-name="P42">d_model = 64 </text:p>
          </table:table-cell>
        </table:table-row>
        <table:table-row>
          <table:table-cell table:style-name="Πίνακας1.A3" office:value-type="string">
            <text:p text:style-name="P42">encoder.layers.1.norm2.bias</text:p>
          </table:table-cell>
          <table:table-cell table:style-name="Πίνακας1.B27" office:value-type="string">
            <text:p text:style-name="P42">Παράμετρος μετατόπισης (β) της δεύτερης LayerNorm του δεύτερου layer. </text:p>
          </table:table-cell>
          <table:table-cell table:style-name="Πίνακας1.C27" office:value-type="string">
            <text:p text:style-name="P42">(64,)</text:p>
          </table:table-cell>
          <table:table-cell table:style-name="Πίνακας1.D27" office:value-type="string">
            <text:p text:style-name="P42">d_model = 64 </text:p>
          </table:table-cell>
        </table:table-row>
        <table:table-row table:style-name="Πίνακας1.28">
          <table:table-cell table:style-name="Πίνακας1.A2" office:value-type="string">
            <text:p text:style-name="P42">fc_out.weight</text:p>
          </table:table-cell>
          <table:table-cell table:style-name="Πίνακας1.B28" office:value-type="string">
            <text:p text:style-name="P42">Βάρη του τελικού γραμμικού ταξινομητή που παράγει τα logits των κατηγοριών. </text:p>
          </table:table-cell>
          <table:table-cell table:style-name="Πίνακας1.C28" office:value-type="string">
            <text:p text:style-name="P42">(10, 64)</text:p>
          </table:table-cell>
          <table:table-cell table:style-name="Πίνακας1.D28" office:value-type="string">
            <text:p text:style-name="P42">n_classes × d_model = 10 × 64 </text:p>
          </table:table-cell>
        </table:table-row>
        <table:table-row>
          <table:table-cell table:style-name="Πίνακας1.A29" office:value-type="string">
            <text:p text:style-name="P42">fc_out.bias</text:p>
          </table:table-cell>
          <table:table-cell table:style-name="Πίνακας1.B29" office:value-type="string">
            <text:p text:style-name="P42">Bias του τελικού ταξινομητή. </text:p>
          </table:table-cell>
          <table:table-cell table:style-name="Πίνακας1.C29" office:value-type="string">
            <text:p text:style-name="P42">(10,)</text:p>
          </table:table-cell>
          <table:table-cell table:style-name="Πίνακας1.D29" office:value-type="string">
            <text:p text:style-name="P42">n_classes = 10 </text:p>
          </table:table-cell>
        </table:table-row>
      </table:table>
      <text:p text:style-name="P39"/>
      <text:p text:style-name="P39"/>
      <text:p text:style-name="P3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en" number:country="GB">
      <number:number number:min-integer-digits="1"/>
    </number:number-style>
    <number:text-style style:name="N20100" number:language="en" number:country="GB">
      <number:text-content/>
    </number:text-style>
    <style:style style:name="Simple_20_Grid_20_Rows.1" style:display-name="Simple Grid Rows.1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2" style:display-name="Simple Grid Rows.2" style:family="table-cell" style:data-style-name="N2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3" style:display-name="Simple Grid Rows.3" style:family="table-cell" style:data-style-name="N2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4" style:display-name="Simple Grid Rows.4" style:family="table-cell" style:data-style-name="N2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5" style:display-name="Simple Grid Rows.5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6" style:display-name="Simple Grid Rows.6" style:family="table-cell" style:data-style-name="N2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7" style:display-name="Simple Grid Rows.7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8" style:display-name="Simple Grid Rows.8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9" style:display-name="Simple Grid Rows.9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0" style:display-name="Simple Grid Rows.10" style:family="table-cell" style:data-style-name="N2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1" style:display-name="Simple Grid Rows.11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2" style:display-name="Simple Grid Rows.12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3" style:display-name="Simple Grid Rows.13" style:family="table-cell" style:data-style-name="N2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4" style:display-name="Simple Grid Rows.14" style:family="table-cell" style:data-style-name="N2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5" style:display-name="Simple Grid Rows.15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6" style:display-name="Simple Grid Rows.16" style:family="table-cell" style:data-style-name="N2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6-07T19:25:14.464000000</meta:creation-date>
    <dc:date>2026-06-11T20:58:09.141000000</dc:date>
    <meta:editing-duration>PT1H28M5S</meta:editing-duration>
    <meta:editing-cycles>25</meta:editing-cycles>
    <meta:generator>LibreOffice/24.8.0.3$Windows_X86_64 LibreOffice_project/0bdf1299c94fe897b119f97f3c613e9dca6be583</meta:generator>
    <meta:document-statistic meta:table-count="1" meta:image-count="1" meta:object-count="17" meta:page-count="6" meta:paragraph-count="178" meta:word-count="1012" meta:character-count="6774" meta:non-whitespace-character-count="5861"/>
  </office:meta>
</office:document-meta>
</file>

<file path=Object 1/content.xml><?xml version="1.0" encoding="utf-8"?>
<math xmlns="http://www.w3.org/1998/Math/MathML" display="block">
  <semantics>
    <mrow>
      <msup>
        <mi>Τ</mi>
        <mi>'</mi>
      </msup>
      <mo stretchy="false">=</mo>
      <mn>5</mn>
    </mrow>
    <annotation encoding="StarMath 5.0">Τ^{ ' } = 5</annotation>
  </semantics>
</math>
</file>

<file path=Object 10/content.xml><?xml version="1.0" encoding="utf-8"?>
<math xmlns="http://www.w3.org/1998/Math/MathML" display="block">
  <semantics>
    <mrow>
      <mi>V</mi>
      <mo stretchy="false">∈</mo>
      <msup>
        <mi>R</mi>
        <mrow>
          <mn>3</mn>
          <mi>x</mi>
          <mn>6</mn>
        </mrow>
      </msup>
    </mrow>
    <annotation encoding="StarMath 5.0">V in R^{3x6}</annotation>
  </semantics>
</math>
</file>

<file path=Object 11/content.xml><?xml version="1.0" encoding="utf-8"?>
<math xmlns="http://www.w3.org/1998/Math/MathML" display="block">
  <semantics>
    <mrow>
      <mi>A</mi>
      <mo stretchy="false">∈</mo>
      <msup>
        <mi>R</mi>
        <mrow>
          <mn>5</mn>
          <mi>x</mi>
          <mn>3</mn>
        </mrow>
      </msup>
    </mrow>
    <annotation encoding="StarMath 5.0">A in R^{ 5x3 }</annotation>
  </semantics>
</math>
</file>

<file path=Object 12/content.xml><?xml version="1.0" encoding="utf-8"?>
<math xmlns="http://www.w3.org/1998/Math/MathML" display="block">
  <semantics>
    <mrow>
      <mi>Y</mi>
      <mo stretchy="false">∈</mo>
      <msup>
        <mi>R</mi>
        <mrow>
          <mn>5</mn>
          <mi>x</mi>
          <mn>6</mn>
        </mrow>
      </msup>
    </mrow>
    <annotation encoding="StarMath 5.0">Y in R^{ 5x6 }</annotation>
  </semantics>
</math>
</file>

<file path=Object 13/content.xml><?xml version="1.0" encoding="utf-8"?>
<math xmlns="http://www.w3.org/1998/Math/MathML" display="block">
  <semantics>
    <mrow>
      <msub>
        <mi>d</mi>
        <mi>k</mi>
      </msub>
      <mo stretchy="false">=</mo>
      <mn>4</mn>
    </mrow>
    <annotation encoding="StarMath 5.0">d_k=4</annotation>
  </semantics>
</math>
</file>

<file path=Object 14/content.xml><?xml version="1.0" encoding="utf-8"?>
<math xmlns="http://www.w3.org/1998/Math/MathML" display="block">
  <semantics>
    <mrow>
      <mi>Τ</mi>
      <mo stretchy="false">=</mo>
      <mn>3</mn>
    </mrow>
    <annotation encoding="StarMath 5.0">Τ = 3</annotation>
  </semantics>
</math>
</file>

<file path=Object 15/content.xml><?xml version="1.0" encoding="utf-8"?>
<math xmlns="http://www.w3.org/1998/Math/MathML" display="block">
  <semantics>
    <mrow>
      <mi>Q</mi>
      <mi>,</mi>
      <mrow>
        <mi>K</mi>
        <mo stretchy="false">∈</mo>
        <msup>
          <mi>R</mi>
          <mrow>
            <mn>3</mn>
            <mi>x</mi>
            <mn>4</mn>
          </mrow>
        </msup>
      </mrow>
    </mrow>
    <annotation encoding="StarMath 5.0">Q,K in R^{ 3x4 }</annotation>
  </semantics>
</math>
</file>

<file path=Object 16/content.xml><?xml version="1.0" encoding="utf-8"?>
<math xmlns="http://www.w3.org/1998/Math/MathML" display="block">
  <semantics>
    <mrow>
      <mi>Τ</mi>
      <mi>,</mi>
      <msup>
        <mi>Τ</mi>
        <mi>'</mi>
      </msup>
      <mi>,</mi>
      <msub>
        <mi>d</mi>
        <mi>k</mi>
      </msub>
      <mi>,</mi>
      <msub>
        <mi>d</mi>
        <mi>u</mi>
      </msub>
    </mrow>
    <annotation encoding="StarMath 5.0">Τ, Τ^{ ' } , d_k , d_u</annotation>
  </semantics>
</math>
</file>

<file path=Object 17/content.xml><?xml version="1.0" encoding="utf-8"?>
<math xmlns="http://www.w3.org/1998/Math/MathML" display="block">
  <semantics>
    <mrow>
      <mn>1</mn>
      <mo stretchy="false">/</mo>
      <msqrt>
        <mrow>
          <mo fence="true" form="prefix" stretchy="false">(</mo>
          <mrow>
            <msub>
              <mi>d</mi>
              <mi>k</mi>
            </msub>
          </mrow>
          <mo fence="true" form="postfix" stretchy="false">)</mo>
        </mrow>
      </msqrt>
    </mrow>
    <annotation encoding="StarMath 5.0">1/sqrt(d_k)</annotation>
  </semantics>
</math>
</file>

<file path=Object 2/content.xml><?xml version="1.0" encoding="utf-8"?>
<math xmlns="http://www.w3.org/1998/Math/MathML" display="block">
  <semantics>
    <mrow>
      <mi>Q</mi>
      <mo stretchy="false">∈</mo>
      <msup>
        <mi>R</mi>
        <mrow>
          <mn>5</mn>
          <mi>x</mi>
          <mn>4</mn>
        </mrow>
      </msup>
    </mrow>
    <annotation encoding="StarMath 5.0">Q in R^{ 5x4 }</annotation>
  </semantics>
</math>
</file>

<file path=Object 3/content.xml><?xml version="1.0" encoding="utf-8"?>
<math xmlns="http://www.w3.org/1998/Math/MathML" display="block">
  <semantics>
    <mrow>
      <msub>
        <mi>d</mi>
        <mi>u</mi>
      </msub>
      <mo stretchy="false">=</mo>
      <mn>6</mn>
    </mrow>
    <annotation encoding="StarMath 5.0">d_u = 6 </annotation>
  </semantics>
</math>
</file>

<file path=Object 4/content.xml><?xml version="1.0" encoding="utf-8"?>
<math xmlns="http://www.w3.org/1998/Math/MathML" display="block">
  <semantics>
    <mrow>
      <mi>V</mi>
      <mo stretchy="false">∈</mo>
      <msup>
        <mi>R</mi>
        <mrow>
          <mn>3</mn>
          <mi>x</mi>
          <mn>6</mn>
        </mrow>
      </msup>
    </mrow>
    <annotation encoding="StarMath 5.0">V in R^{3x6}</annotation>
  </semantics>
</math>
</file>

<file path=Object 5/content.xml><?xml version="1.0" encoding="utf-8"?>
<math xmlns="http://www.w3.org/1998/Math/MathML" display="block">
  <semantics>
    <mrow>
      <mi>A</mi>
      <mo stretchy="false">∈</mo>
      <msup>
        <mi>R</mi>
        <mrow>
          <mn>3</mn>
          <mi>x</mi>
          <mn>3</mn>
        </mrow>
      </msup>
    </mrow>
    <annotation encoding="StarMath 5.0">A in R^{ 3x3 }</annotation>
  </semantics>
</math>
</file>

<file path=Object 6/content.xml><?xml version="1.0" encoding="utf-8"?>
<math xmlns="http://www.w3.org/1998/Math/MathML" display="block">
  <semantics>
    <mrow>
      <mi>Y</mi>
      <mo stretchy="false">∈</mo>
      <msup>
        <mi>R</mi>
        <mrow>
          <mn>3</mn>
          <mi>x</mi>
          <mn>6</mn>
        </mrow>
      </msup>
    </mrow>
    <annotation encoding="StarMath 5.0">Y in R^{ 3x6 }</annotation>
  </semantics>
</math>
</file>

<file path=Object 7/content.xml><?xml version="1.0" encoding="utf-8"?>
<math xmlns="http://www.w3.org/1998/Math/MathML" display="block">
  <semantics>
    <mrow>
      <mi>Q</mi>
      <msup>
        <mi>K</mi>
        <mi>T</mi>
      </msup>
    </mrow>
    <annotation encoding="StarMath 5.0">Q K^T</annotation>
  </semantics>
</math>
</file>

<file path=Object 8/content.xml><?xml version="1.0" encoding="utf-8"?>
<math xmlns="http://www.w3.org/1998/Math/MathML" display="block">
  <semantics>
    <mrow>
      <mi>K</mi>
      <mo stretchy="false">∈</mo>
      <msup>
        <mi>R</mi>
        <mrow>
          <mn>3</mn>
          <mi>x</mi>
          <mn>4</mn>
        </mrow>
      </msup>
    </mrow>
    <annotation encoding="StarMath 5.0">K in R ^ { 3x4 }</annotation>
  </semantics>
</math>
</file>

<file path=Object 9/content.xml><?xml version="1.0" encoding="utf-8"?>
<math xmlns="http://www.w3.org/1998/Math/MathML" display="block">
  <semantics>
    <mrow>
      <msub>
        <mi>d</mi>
        <mi>u</mi>
      </msub>
      <mo stretchy="false">=</mo>
      <mn>6</mn>
    </mrow>
    <annotation encoding="StarMath 5.0">d_u = 6 </annotation>
  </semantics>
</math>
</file>